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he Interfaceː</text:p>
      <text:p text:style-name="P1"/>
      <text:p text:style-name="P2">Enter new vocabulary entries or replace old ones in the two entry boxes. The top entry box is for the term, the bottom is for the definition.</text:p>
      <text:p text:style-name="P2"/>
      <text:p text:style-name="P2">Clicking “Enter” takes the term and entry as given in the entry boxes and adds them to the internal list. The changes are not saved at this point, but the tree view in the middle of the window will now have the entry. </text:p>
      <text:p text:style-name="P2"/>
      <text:p text:style-name="P2">Clicking the top of a column hides that column by replacing all the entries with asterisks, like when entering a password.</text:p>
      <text:p text:style-name="P2"/>
      <text:p text:style-name="P2"/>
      <text:p text:style-name="P1">Sorting the entriesː</text:p>
      <text:p text:style-name="P1"/>
      <text:p text:style-name="P1">Entering a study modeː</text:p>
      <text:p text:style-name="P1"/>
      <text:p text:style-name="P1">Hiding the terms or definitionsː</text:p>
      <text:p text:style-name="P1"/>
      <text:p text:style-name="P1">Saving changesː</text:p>
      <text:p text:style-name="P1"/>
      <text:p text:style-name="P2">Hit “Ctrl+S”, go to File &gt; Save List, or hit “Yes” when prompted to save on quitting the program. Quitting the program by hitting the quit button OR the X at the top of the window will prompt you to save. </text:p>
      <text:p text:style-name="P2"/>
      <text:p text:style-name="P2">If you don't want to save, exiting the progam without saving is enough. You can also delete or replace any entry you'd like in the interface.</text:p>
      <text:p text:style-name="P2"/>
      <text:p text:style-name="P1">Replacing an entry:</text:p>
      <text:p text:style-name="P1"/>
      <text:p text:style-name="P2">Say you need to update an entry, whether because you hit Enter before you finished, hit enter with a typo, or just need to add new info. Clicking on an entry in the tree view populates the entry boxes with the terms and definitions so you can go in and edit it without typing it in from the beginning. Hitting “Replace” will replace the selected row in the tree view with the new data in the entry bo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DeHass</meta:initial-creator>
    <meta:creation-date>2025-10-23T18:43:01</meta:creation-date>
    <dc:date>2025-10-23T18:53:35</dc:date>
    <dc:creator>Matthew DeHass</dc:creator>
    <meta:editing-duration>PT10M41S</meta:editing-duration>
    <meta:editing-cycles>3</meta:editing-cycles>
    <meta:generator>OpenOffice/4.1.15$Unix OpenOffice.org_project/4115m2$Build-9813</meta:generator>
    <meta:document-statistic meta:table-count="0" meta:image-count="0" meta:object-count="0" meta:page-count="1" meta:paragraph-count="12" meta:word-count="255" meta:character-count="1353"/>
  </office:meta>
</office:document-meta>
</file>